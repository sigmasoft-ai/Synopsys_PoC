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style:style>
    <style:style style:name="T2" style:parent-style-name="DefaultParagraphFont" style:family="text">
      <style:text-properties fo:font-weight="bold" style:font-weight-asian="bold" style:font-weight-complex="bold" fo:font-size="11pt" style:font-size-asian="11pt" style:font-size-complex="11pt"/>
    </style:style>
    <style:style style:name="T3" style:parent-style-name="DefaultParagraphFont" style:family="text">
      <style:text-properties fo:font-size="11pt" style:font-size-asian="11pt" style:font-size-complex="11pt" fo:background-color="#FFFF00"/>
    </style:style>
    <style:style style:name="T4" style:parent-style-name="DefaultParagraphFont" style:family="text">
      <style:text-properties fo:font-size="11pt" style:font-size-asian="11pt" style:font-size-complex="11pt"/>
    </style:style>
    <style:style style:name="P5" style:parent-style-name="Normal" style:family="paragraph">
      <style:text-properties fo:font-size="11pt" style:font-size-asian="11pt" style:font-size-complex="11pt"/>
    </style:style>
    <style:style style:name="P6" style:parent-style-name="Normal" style:family="paragraph">
      <style:text-properties fo:font-size="11pt" style:font-size-asian="11pt" style:font-size-complex="11pt"/>
    </style:style>
    <style:style style:name="T7" style:parent-style-name="DefaultParagraphFont" style:family="text">
      <style:text-properties fo:font-weight="bold" style:font-weight-asian="bold" style:font-weight-complex="bold" fo:font-size="11pt" style:font-size-asian="11pt" style:font-size-complex="11pt"/>
    </style:style>
    <style:style style:name="T8" style:parent-style-name="DefaultParagraphFont" style:family="text">
      <style:text-properties fo:font-size="11pt" style:font-size-asian="11pt" style:font-size-complex="11pt"/>
    </style:style>
    <style:style style:name="T9" style:parent-style-name="DefaultParagraphFont" style:family="text">
      <style:text-properties fo:font-size="11pt" style:font-size-asian="11pt" style:font-size-complex="11pt" fo:background-color="#FFFF00"/>
    </style:style>
    <style:style style:name="T10" style:parent-style-name="DefaultParagraphFont" style:family="text">
      <style:text-properties fo:font-size="11pt" style:font-size-asian="11pt" style:font-size-complex="11pt"/>
    </style:style>
    <style:style style:name="P11" style:parent-style-name="Normal" style:family="paragraph">
      <style:text-properties fo:font-size="11pt" style:font-size-asian="11pt" style:font-size-complex="11pt"/>
    </style:style>
    <style:style style:name="P12" style:parent-style-name="Normal" style:family="paragraph">
      <style:text-properties fo:font-size="11pt" style:font-size-asian="11pt" style:font-size-complex="11pt"/>
    </style:style>
    <style:style style:name="T13" style:parent-style-name="DefaultParagraphFont" style:family="text">
      <style:text-properties fo:font-weight="bold" style:font-weight-asian="bold" style:font-weight-complex="bold" fo:font-size="11pt" style:font-size-asian="11pt" style:font-size-complex="11pt"/>
    </style:style>
    <style:style style:name="T14" style:parent-style-name="DefaultParagraphFont" style:family="text">
      <style:text-properties fo:font-size="11pt" style:font-size-asian="11pt" style:font-size-complex="11pt"/>
    </style:style>
    <style:style style:name="P15" style:parent-style-name="Normal" style:family="paragraph">
      <style:text-properties fo:font-size="11pt" style:font-size-asian="11pt" style:font-size-complex="11pt"/>
    </style:style>
    <style:style style:name="T16" style:parent-style-name="DefaultParagraphFont" style:family="text">
      <style:text-properties fo:font-weight="bold" style:font-weight-asian="bold" style:font-weight-complex="bold" fo:font-size="11pt" style:font-size-asian="11pt" style:font-size-complex="11pt"/>
    </style:style>
    <style:style style:name="T17" style:parent-style-name="DefaultParagraphFont" style:family="text">
      <style:text-properties fo:font-size="11pt" style:font-size-asian="11pt" style:font-size-complex="11pt"/>
    </style:style>
    <style:style style:name="T18" style:parent-style-name="DefaultParagraphFont" style:family="text">
      <style:text-properties fo:font-size="11pt" style:font-size-asian="11pt" style:font-size-complex="11pt"/>
    </style:style>
    <style:style style:name="T19" style:parent-style-name="DefaultParagraphFont" style:family="text">
      <style:text-properties fo:font-weight="bold" style:font-weight-asian="bold" style:font-weight-complex="bold" fo:font-size="11pt" style:font-size-asian="11pt" style:font-size-complex="11pt"/>
    </style:style>
    <style:style style:name="P20" style:parent-style-name="Normal" style:family="paragraph">
      <style:text-properties fo:font-size="11pt" style:font-size-asian="11pt" style:font-size-complex="11pt"/>
    </style:style>
    <style:style style:name="T21" style:parent-style-name="DefaultParagraphFont" style:family="text">
      <style:text-properties fo:font-weight="bold" style:font-weight-asian="bold" style:font-weight-complex="bold" fo:font-size="11pt" style:font-size-asian="11pt" style:font-size-complex="11pt"/>
    </style:style>
    <style:style style:name="P22" style:parent-style-name="Normal" style:family="paragraph">
      <style:text-properties fo:font-size="11pt" style:font-size-asian="11pt" style:font-size-complex="11pt"/>
    </style:style>
    <style:style style:name="P23" style:parent-style-name="Normal" style:family="paragraph">
      <style:text-properties fo:font-size="11pt" style:font-size-asian="11pt" style:font-size-complex="11pt"/>
    </style:style>
    <style:style style:name="T24" style:parent-style-name="DefaultParagraphFont" style:family="text">
      <style:text-properties fo:font-weight="bold" style:font-weight-asian="bold" style:font-weight-complex="bold" fo:font-size="11pt" style:font-size-asian="11pt" style:font-size-complex="11pt"/>
    </style:style>
    <style:style style:name="P25" style:parent-style-name="Normal" style:family="paragraph">
      <style:text-properties fo:font-size="11pt" style:font-size-asian="11pt" style:font-size-complex="11pt"/>
    </style:style>
    <style:style style:name="P26" style:parent-style-name="Normal" style:family="paragraph">
      <style:text-properties fo:font-size="11pt" style:font-size-asian="11pt" style:font-size-complex="11pt"/>
    </style:style>
    <style:style style:name="P27" style:parent-style-name="Normal" style:family="paragraph">
      <style:text-properties fo:font-weight="bold" style:font-weight-asian="bold" style:font-weight-complex="bold" fo:font-size="11pt" style:font-size-asian="11pt" style:font-size-complex="11pt"/>
    </style:style>
    <style:style style:name="P28" style:parent-style-name="Normal" style:family="paragraph">
      <style:text-properties fo:font-size="11pt" style:font-size-asian="11pt" style:font-size-complex="11pt"/>
    </style:style>
    <style:style style:name="P29" style:parent-style-name="Normal" style:family="paragraph">
      <style:text-properties fo:font-size="11pt" style:font-size-asian="11pt" style:font-size-complex="11pt"/>
    </style:style>
    <style:style style:name="T30" style:parent-style-name="DefaultParagraphFont" style:family="text">
      <style:text-properties fo:font-weight="bold" style:font-weight-asian="bold" style:font-weight-complex="bold" fo:font-size="11pt" style:font-size-asian="11pt" style:font-size-complex="11pt"/>
    </style:style>
    <style:style style:name="T31" style:parent-style-name="DefaultParagraphFont" style:family="text">
      <style:text-properties fo:font-size="11pt" style:font-size-asian="11pt" style:font-size-complex="11pt"/>
    </style:style>
    <style:style style:name="P32" style:parent-style-name="Normal" style:family="paragraph">
      <style:text-properties fo:font-size="11pt" style:font-size-asian="11pt" style:font-size-complex="11pt"/>
    </style:style>
    <style:style style:name="P33" style:parent-style-name="Normal" style:family="paragraph">
      <style:text-properties fo:font-size="11pt" style:font-size-asian="11pt" style:font-size-complex="11pt"/>
    </style:style>
    <style:style style:name="P34" style:parent-style-name="Normal" style:family="paragraph">
      <style:text-properties fo:font-size="11pt" style:font-size-asian="11pt" style:font-size-complex="11pt"/>
    </style:style>
    <style:style style:name="T35" style:parent-style-name="DefaultParagraphFont" style:family="text">
      <style:text-properties fo:font-weight="bold" style:font-weight-asian="bold" style:font-weight-complex="bold" fo:font-size="11pt" style:font-size-asian="11pt" style:font-size-complex="11pt"/>
    </style:style>
    <style:style style:name="T36" style:parent-style-name="DefaultParagraphFont" style:family="text">
      <style:text-properties fo:font-size="11pt" style:font-size-asian="11pt" style:font-size-complex="11pt"/>
    </style:style>
    <style:style style:name="T37" style:parent-style-name="DefaultParagraphFont" style:family="text">
      <style:text-properties fo:font-size="11pt" style:font-size-asian="11pt" style:font-size-complex="11pt"/>
    </style:style>
  </office:automatic-styles>
  <office:body>
    <office:text text:use-soft-page-breaks="true">
      <text:p text:style-name="P1"><text:span text:style-name="T2">Section 1 :<text:s/></text:span><text:span text:style-name="T3">Executive Summary</text:span><text:span text:style-name="T4"><text:s/></text:span></text:p>
      <text:p text:style-name="P5">This proposal outlines the scope and expectations for engaging an external implementation partner to introduce dbt Enterprise into our Enterprise Data Platform (EDP). The current EDP uses Matillion to handle extraction and the majority of transformation logic, feeding into a Landing layer and Data Lake (DL). The proposed architecture introduces a new structured pipeline (S3 → Landing → Staging → Curated → DW), with Matillion re-scoped to lightweight extraction and loading, and dbt owning all transformation — making transformation logic version-controlled, testable, and reusable across projects. The engagement covers framework setup, building new projects natively in dbt, and migrating existing pipelines to the new framework. Knowledge transfer is a primary objective — the internal team holds strong SQL and Snowflake expertise and must own the framework fully at engagement close.<text:s/></text:p>
      <text:p text:style-name="P6"/>
      <text:p text:style-name="Normal"><text:span text:style-name="T7">Section 2</text:span><text:span text:style-name="T8"><text:s/></text:span><text:span text:style-name="T9">Background &amp; Architecture Current EDP flow</text:span><text:span text:style-name="T10">:<text:s/></text:span></text:p>
      <text:p text:style-name="P11">Current: Source → Landing (raw data) → Data Lake (DL)→ DW Future EDP flow: · · · Future: Source → S3 → Landing → Staging → Curated → DW Matillion role: Matillion: lightweight Extract + Load only (S3 → Landing) dbt role: dbt: owns all transformation from Staging → Curated → DW The future architecture retains Landing as the raw Snowflake layer and adds three new dbt-managed layers: Staging (clean, typed data), Curated (business logic and enrichment), and DW (consumer-facing dimensional models). Matillion becomes a lightweight EL tool — its transformation responsibility moves entirely to dbt.<text:s/></text:p>
      <text:p text:style-name="P12"/>
      <text:p text:style-name="Normal"><text:span text:style-name="T13">Section 3</text:span><text:span text:style-name="T14"><text:s/>Engagement Objectives # Objective Description 1 2 Framework first Accelerate adoption Deliver a production-ready dbt project structure aligned to the new layer convention that becomes the internal standard for all future development. Build 3 new data projects natively in dbt(1 simple, 1 moderate and 1complex), demonstrating the framework in practice and building internal confidence. 3 4 Prove migration path Full knowledge transfer Migrate 1 simple(example : provisioning data stored in dbms database into snowflake) and 1 moderate-complexity(example : anaplan data into snowflake) existing pipeline to dbt, establishing a repeatable migration playbook. Ensure the internal team can self-serve, extend, and govern the framework independently upon engagement close.<text:s/></text:span></text:p>
      <text:p text:style-name="P15"/>
      <text:p text:style-name="Normal"><text:span text:style-name="T16">Section 4</text:span><text:span text:style-name="T17"><text:s/>Scope of Work The partner will deliver the following scope across the engagement: Framework setup Design and deliver a production-ready dbt project structure aligned to the new pipeline layer convention, establishing the standards and guardrails all future development follows. · · · · · · · dbt Enterprise project initialisation and Snowflake connection configuration Folder structure: models/staging, models/intermediate (curated), models/marts (DW) dbt profiles, environments (dev / CI / prod), and Snowflake RBAC setup Base macros and reusable components<text:s/></text:span><text:soft-page-break/><text:span text:style-name="T18">(surrogate keys, SCD helpers, date spine) Testing framework: not_null, unique, relationships, accepted_values on all staging models CI/CD pipeline: slim builds on PR, full refresh on merge to main Define and configure dbt job scheduling using dbt Cloud Scheduler, including production run cadence, alerting on failure, and integration with Matillion pipeline completion where applicable · · Column-level documentation standards and source freshness checks Coding standards guide and PR review checklist for internal team New project builds Build 2–3 new data projects end-to-end using the new framework and pipeline structure. Internal team members co-develop — not observe. · · · Staging, Curated, and DW models per project — fully tested and documented Internal team co-develops under partner guidance (pair programming / code review) Retrospective per project to capture lessons learned Pipeline migration (1 simple + 1 moderate) Migrate two existing pipelines from the current Data Lake model into the new dbt framework, establishing a repeatable migration approach the internal team can apply independently. · · · · · Discovery: map existing transformation logic and document business rules Re-implement transformation logic as dbt models within the established framework Parallel validation: run dbt output alongside existing output and reconcile differences Cutover plan with rollback procedure; decommission of legacy transformation jobs Migration runbook for internal team to reuse on future pipelines independently<text:s/></text:span></text:p>
      <text:p text:style-name="Normal"><text:span text:style-name="T19">Section 5</text:span></text:p>
      <text:p text:style-name="P20"><text:s/>Out of Scope · · · · Matillion EL pipeline changes or re-engineering of extraction logic Snowflake infrastructure provisioning, cost optimisation, or warehouse sizing BI tool development (Tableau, Power BI, Looker or similar) Ongoing managed service or post-engagement support (separate SoW if required)<text:s/></text:p>
      <text:p text:style-name="Normal"><text:span text:style-name="T21">Section 6<text:s/></text:span></text:p>
      <text:p text:style-name="P22">Internal Team Responsibilities · Ensure appropriate internal ownership and team capacity is allocated for the duration of the engagement · Provide timely access to source schemas, existing transformation logic documentation, and business rules · · · · Participate in new project builds as co-developers — not reviewers after the fact Review and approve framework standards before new project builds begin Conduct PR reviews on all partner-submitted code using the agreed checklist Own CI/CD pipeline configuration in collaboration with the DevOps/platform team<text:s/></text:p>
      <text:p text:style-name="P23"/>
      <text:p text:style-name="Normal"><text:span text:style-name="T24">Section 7</text:span></text:p>
      <text:p text:style-name="P25"><text:s/>Key Deliverables · · dbt project repository — fully configured, version-controlled dbt project in the team's Git platform Framework standards document — folder structure, testing standards, coding conventions, PR checklist · CI/CD pipeline — automated slim CI build on PR; full build on merge to production branch · · · · Macro library — reusable macros for surrogate keys, SCD, date spine, and common patterns Domain model sets — Staging, Curated, and DW models per project, fully tested and documented Knowledge transfer sessions — paired development sessions with internal team members Migration runbook — step-by-step process for migrating legacy pipelines to dbt, reusable by internal team · · Migrated pipeline models (x2) — 2 pipelines re-implemented in dbt with parallel<text:s/><text:soft-page-break/>validation sign-off Weekly status report — progress, blockers, and decisions log shared with internal stakeholders<text:s/></text:p>
      <text:p text:style-name="P26"/>
      <text:p text:style-name="P27">Section 8<text:s/></text:p>
      <text:p text:style-name="P28">Knowledge Transfer Requirements · Given the internal team's strong SQL and Snowflake background, knowledge transfer is structured as active participation rather than formal training. The partner is required to: Pair program with internal developers on all new project builds and pipeline migrations · · · · · Conduct code reviews on internally-written models with written feedback (not just approvals) Deliver a 2-hour dbt framework walkthrough session once the framework is established Document all framework decisions and the reasoning behind them in the project wiki Provide a recorded session covering CI/CD pipeline operation and troubleshooting Be available for async Q&amp;A throughout the engagement<text:s/></text:p>
      <text:p text:style-name="P29"/>
      <text:p text:style-name="Normal"><text:span text:style-name="T30">Section 9</text:span><text:span text:style-name="T31"><text:s/></text:span></text:p>
      <text:p text:style-name="P32"/>
      <text:p text:style-name="P33">Risks &amp; Mitigations Risk Description Framework too generic Knowledge not transferred Partner delivers boilerplate not tailored to our layer convention Partner builds in isolation; team remains dependent after engagement Mitigation Internal team sign-off on framework before new project builds begin Co-development mandate on all builds; code review requirement throughout Migration scope creep Access delays Moderate project turns out significantly more complex than estimated Slow provisioning of existing job documentation or schema access Discovery sprint at migration start with go/no-go before rebuild begins Internal team pre-provisions all access before migration work begins Staff continuity<text:s/></text:p>
      <text:p text:style-name="P34"><text:s text:c="39"/></text:p>
      <text:p text:style-name="Normal"><text:span text:style-name="T35">Section 10</text:span><text:span text:style-name="T36"><text:s/></text:span></text:p>
      <text:p text:style-name="Normal"><text:span text:style-name="T37">Success Criteria Partner rotates key personnel mid-engagement Contract clause requiring 2-week overlap and written handover on any change The engagement is considered successful when all of the following are met. · · · · dbt framework is live in production with CI/CD running on the team's Git platform At least 2 new projects are built end-to-end within the new framework by joint teams 2 existing pipelines have been migrated to dbt, validated, and cut over The internal team delivers one model end-to-end without partner involvement before engagement closes. · · · All models have passing tests, column-level documentation, and are visible in dbt Explorer Migration runbook is complete and has been walk-through validated with the internal team No critical framework decisions are undocumented or held only by partner personnel</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chutha Raju Kalvakolanu</meta:initial-creator>
    <dc:creator>Prabhat Swain</dc:creator>
    <meta:creation-date>2026-04-29T05:06:00Z</meta:creation-date>
    <dc:date>2026-04-30T17:17:00Z</dc:date>
    <meta:template xlink:href="Normal" xlink:type="simple"/>
    <meta:editing-cycles>1</meta:editing-cycles>
    <meta:editing-duration>PT2700S</meta:editing-duration>
    <meta:document-statistic meta:page-count="3" meta:paragraph-count="18" meta:word-count="1225" meta:character-count="8538" meta:row-count="109" meta:non-whitespace-character-count="7261"/>
  </office:meta>
</office:document-meta>
</file>